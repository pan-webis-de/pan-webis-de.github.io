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800000051660C137F.png" manifest:media-type="image/png"/>
  <manifest:file-entry manifest:full-path="Pictures/1000FDD800000C020000042B2282F5F3.emf" manifest:media-type="image/x-emf"/>
  <manifest:file-entry manifest:full-path="Pictures/100000010000080000000800F3D2ABE1.png" manifest:media-type="image/png"/>
  <manifest:file-entry manifest:full-path="Pictures/10000001000000FC000000F80911DDBA.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adornments="Bold"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officeooo:rsid="001b5830" officeooo:paragraph-rsid="001342e6" style:font-name-complex="Cambria Math1"/>
    </style:style>
    <style:style style:name="P2" style:family="paragraph" style:parent-style-name="Standard">
      <style:paragraph-properties fo:margin-top="0cm" fo:margin-bottom="0.494cm" style:contextual-spacing="true" fo:text-indent="0cm" style:auto-text-indent="false"/>
      <style:text-properties style:font-name="Libertinus Sans" officeooo:paragraph-rsid="001342e6" style:font-name-complex="Cambria Math1"/>
    </style:style>
    <style:style style:name="P3" style:family="paragraph" style:parent-style-name="Author_20_First_20_Name">
      <style:paragraph-properties fo:margin-top="0.494cm" fo:margin-bottom="0.494cm" style:contextual-spacing="true"/>
    </style:style>
    <style:style style:name="P4" style:family="paragraph" style:parent-style-name="Footnote">
      <style:text-properties fo:font-style="italic" style:font-style-asian="italic" style:font-style-complex="italic"/>
    </style:style>
    <style:style style:name="P5" style:family="paragraph">
      <loext:graphic-properties draw:fill="solid" draw:fill-color="#ffffff"/>
      <style:paragraph-properties fo:text-align="center"/>
    </style:style>
    <style:style style:name="P6" style:family="paragraph" style:parent-style-name="Footnote">
      <style:paragraph-properties fo:margin-top="0cm" fo:margin-bottom="0cm" style:contextual-spacing="false"/>
    </style:style>
    <style:style style:name="P7" style:family="paragraph" style:parent-style-name="Footnote">
      <style:paragraph-properties fo:margin-top="0cm" fo:margin-bottom="0cm" style:contextual-spacing="false" fo:text-align="lef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cm" fo:margin-bottom="0cm" style:contextual-spacing="false" fo:text-align="left" style:justify-single-word="false" fo:orphans="2" fo:widows="2"/>
      <style:text-properties fo:language="en" fo:country="US" style:letter-kerning="false" style:language-complex="ar" style:country-complex="SA"/>
    </style:style>
    <style:style style:name="P9" style:family="paragraph" style:parent-style-name="Standard">
      <style:paragraph-properties fo:text-indent="0cm" style:auto-text-indent="false"/>
    </style:style>
    <style:style style:name="P10" style:family="paragraph" style:parent-style-name="Heading_20_1">
      <style:text-properties officeooo:paragraph-rsid="001e9e31"/>
    </style:style>
    <style:style style:name="P11" style:family="paragraph" style:parent-style-name="Standard">
      <style:paragraph-properties fo:text-indent="0cm" style:auto-text-indent="false"/>
      <style:text-properties officeooo:rsid="00178465" officeooo:paragraph-rsid="00178465"/>
    </style:style>
    <style:style style:name="P12" style:family="paragraph" style:parent-style-name="Heading_20_1">
      <style:text-properties style:font-name="Libertinus Sans" officeooo:rsid="0029c56c" officeooo:paragraph-rsid="0029c56c"/>
    </style:style>
    <style:style style:name="P13" style:family="paragraph" style:parent-style-name="Standard">
      <style:paragraph-properties fo:text-indent="0cm" style:auto-text-indent="false"/>
      <style:text-properties officeooo:paragraph-rsid="002b85e2"/>
    </style:style>
    <style:style style:name="P14" style:family="paragraph" style:parent-style-name="Standard">
      <style:paragraph-properties fo:margin-top="0.494cm" fo:margin-bottom="0.494cm" style:contextual-spacing="true" fo:text-align="justify" style:justify-single-word="false" fo:text-indent="0cm" style:auto-text-indent="false"/>
      <style:text-properties officeooo:paragraph-rsid="00093e83"/>
    </style:style>
    <style:style style:name="P15" style:family="paragraph" style:parent-style-name="Standard">
      <style:text-properties officeooo:paragraph-rsid="0026dd52"/>
    </style:style>
    <style:style style:name="P16" style:family="paragraph" style:parent-style-name="Heading_20_1">
      <style:text-properties style:font-name="Libertinus Sans"/>
    </style:style>
    <style:style style:name="P17" style:family="paragraph" style:parent-style-name="Heading_20_2">
      <style:paragraph-properties fo:margin-left="1.401cm" fo:text-indent="-1.401cm" style:auto-text-indent="false"/>
      <style:text-properties style:font-name="Libertinus Sans"/>
    </style:style>
    <style:style style:name="P18" style:family="paragraph" style:parent-style-name="Numbered_20_list" style:list-style-name="WWNum3">
      <style:paragraph-properties fo:text-align="left" style:justify-single-word="false"/>
      <style:text-properties officeooo:paragraph-rsid="00093e83"/>
    </style:style>
    <style:style style:name="P19" style:family="paragraph" style:parent-style-name="Numbered_20_list" style:list-style-name="WWNum3">
      <style:paragraph-properties fo:text-align="left" style:justify-single-word="false"/>
    </style:style>
    <style:style style:name="P20" style:family="paragraph" style:parent-style-name="Numbered_20_list" style:list-style-name="WWNum41">
      <style:paragraph-properties fo:text-align="left" style:justify-single-word="false"/>
      <style:text-properties officeooo:paragraph-rsid="00093e83"/>
    </style:style>
    <style:style style:name="P21" style:family="paragraph" style:parent-style-name="Numbered_20_list" style:list-style-name="WWNum3">
      <style:paragraph-properties fo:text-align="left" style:justify-single-word="false"/>
      <style:text-properties officeooo:paragraph-rsid="0030d856"/>
    </style:style>
    <style:style style:name="P22" style:family="paragraph" style:parent-style-name="Standard">
      <style:text-properties officeooo:paragraph-rsid="00093e83"/>
    </style:style>
    <style:style style:name="P23" style:family="paragraph" style:parent-style-name="Numbered_20_list" style:list-style-name="WWNum42">
      <style:text-properties officeooo:paragraph-rsid="000a74d8"/>
    </style:style>
    <style:style style:name="P24" style:family="paragraph" style:parent-style-name="Numbered_20_list" style:list-style-name="WWNum3"/>
    <style:style style:name="P25" style:family="paragraph" style:parent-style-name="Heading_20_2">
      <style:paragraph-properties fo:margin-left="1.401cm" fo:text-indent="-1.401cm" style:auto-text-indent="false"/>
    </style:style>
    <style:style style:name="P26" style:family="paragraph" style:parent-style-name="Bulleted_20_List" style:list-style-name="WWNum4"/>
    <style:style style:name="P27" style:family="paragraph" style:parent-style-name="Heading_20_3">
      <style:paragraph-properties fo:margin-left="2.161cm" fo:text-indent="-2.161cm" style:auto-text-indent="false"/>
      <style:text-properties style:font-name="Libertinus Sans"/>
    </style:style>
    <style:style style:name="P28" style:family="paragraph" style:parent-style-name="Heading_20_3">
      <style:paragraph-properties fo:margin-left="2.161cm" fo:text-indent="-2.161cm" style:auto-text-indent="false"/>
    </style:style>
    <style:style style:name="P29" style:family="paragraph" style:parent-style-name="Standard">
      <style:paragraph-properties fo:margin-top="0cm" fo:margin-bottom="0.423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30" style:family="paragraph" style:parent-style-name="Standard">
      <style:paragraph-properties fo:margin-top="0cm" fo:margin-bottom="0.423cm" style:contextual-spacing="true" fo:orphans="2" fo:widows="2" fo:text-indent="0cm" style:auto-text-indent="false"/>
      <style:text-properties fo:language="en" fo:country="US" style:letter-kerning="false" style:language-complex="ar" style:country-complex="SA"/>
    </style:style>
    <style:style style:name="P31" style:family="paragraph" style:parent-style-name="Standard">
      <style:paragraph-properties fo:margin-top="0cm" fo:margin-bottom="0.423cm" style:contextual-spacing="true" fo:text-align="center" style:justify-single-word="false" fo:orphans="2" fo:widows="2" fo:text-indent="0cm" style:auto-text-indent="false"/>
      <style:text-properties style:font-name="Cambria Math" fo:language="en" fo:country="US" style:letter-kerning="false" style:font-name-complex="Cambria Math1" style:language-complex="ar" style:country-complex="SA"/>
    </style:style>
    <style:style style:name="P32"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33"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34" style:family="paragraph" style:parent-style-name="Acknowledgements_20__28_Heading_29_">
      <style:paragraph-properties fo:margin-left="0.635cm" fo:line-height="100%" fo:text-indent="-0.635cm" style:auto-text-indent="false"/>
      <style:text-properties style:font-name="Libertinus Sans"/>
    </style:style>
    <style:style style:name="P35" style:family="paragraph" style:parent-style-name="Acknowledgements_20__28_Heading_29_">
      <style:paragraph-properties fo:margin-left="0.635cm" fo:line-height="100%" fo:text-indent="-0.635cm" style:auto-text-indent="false"/>
      <style:text-properties style:font-name="Libertinus Sans" officeooo:rsid="000cb7ed" officeooo:paragraph-rsid="000cb7ed"/>
    </style:style>
    <style:style style:name="P36" style:family="paragraph" style:parent-style-name="Standard">
      <style:paragraph-properties fo:text-indent="0cm" style:auto-text-indent="false"/>
      <style:text-properties fo:font-style="italic" officeooo:rsid="000cb7ed" officeooo:paragraph-rsid="000cb7ed" style:font-style-asian="italic" style:font-style-complex="italic"/>
    </style:style>
    <style:style style:name="P37" style:family="paragraph" style:parent-style-name="Standard">
      <style:paragraph-properties fo:text-indent="0cm" style:auto-text-indent="false"/>
      <style:text-properties officeooo:paragraph-rsid="000cb7ed"/>
    </style:style>
    <style:style style:name="P38" style:family="paragraph" style:parent-style-name="Standard">
      <style:paragraph-properties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9" style:family="paragraph" style:parent-style-name="Standard">
      <style:paragraph-properties fo:text-indent="0cm" style:auto-text-indent="false"/>
      <style:text-properties style:font-name="Libertinus Serif" officeooo:rsid="000cb7ed" officeooo:paragraph-rsid="000cb7ed"/>
    </style:style>
    <style:style style:name="P40" style:family="paragraph" style:parent-style-name="Acknowledgements_20__28_Heading_29_">
      <style:paragraph-properties fo:margin-left="0.635cm" fo:text-indent="-0.635cm" style:auto-text-indent="false"/>
      <style:text-properties style:font-name="Libertinus Sans"/>
    </style:style>
    <style:style style:name="P41" style:family="paragraph" style:parent-style-name="reference" style:list-style-name="WWNum24">
      <style:paragraph-properties fo:margin-left="0.751cm" fo:text-indent="-0.751cm" style:auto-text-indent="false"/>
      <style:text-properties fo:language="sv" fo:country="SE"/>
    </style:style>
    <style:style style:name="P42" style:family="paragraph" style:parent-style-name="reference" style:list-style-name="WWNum24">
      <style:paragraph-properties fo:margin-left="0.751cm" fo:text-indent="-0.751cm" style:auto-text-indent="false"/>
    </style:style>
    <style:style style:name="T1" style:family="text">
      <style:text-properties officeooo:rsid="0034e7c4"/>
    </style:style>
    <style:style style:name="T2" style:family="text">
      <style:text-properties officeooo:rsid="002293a9"/>
    </style:style>
    <style:style style:name="T3" style:family="text">
      <style:text-properties officeooo:rsid="001b5830"/>
    </style:style>
    <style:style style:name="T4" style:family="text">
      <style:text-properties officeooo:rsid="0016483c"/>
    </style:style>
    <style:style style:name="T5" style:family="text">
      <style:text-properties fo:color="#000000" loext:opacity="100%" style:text-position="super 58%" fo:font-style="italic" style:font-style-asian="italic" style:font-style-complex="italic">
        <loext:char-complex-color loext:theme-type="dark1" loext:color-type="theme"/>
      </style:text-properties>
    </style:style>
    <style:style style:name="T6" style:family="text">
      <style:text-properties fo:color="#000000" loext:opacity="100%" style:text-position="super 58%">
        <loext:char-complex-color loext:theme-type="dark1" loext:color-type="theme"/>
      </style:text-properties>
    </style:style>
    <style:style style:name="T7" style:family="text">
      <style:text-properties style:use-window-font-color="true" loext:opacity="0%"/>
    </style:style>
    <style:style style:name="T8" style:family="text">
      <style:text-properties fo:color="#000000" loext:opacity="100%" style:text-position="super 58%" fo:font-style="italic" style:font-style-asian="italic">
        <loext:char-complex-color loext:theme-type="dark1" loext:color-type="theme"/>
      </style:text-properties>
    </style:style>
    <style:style style:name="T9" style:family="text">
      <style:text-properties fo:color="#000000" loext:opacity="100%" style:text-position="super 58%" style:font-style-complex="italic">
        <loext:char-complex-color loext:theme-type="dark1" loext:color-type="theme"/>
      </style:text-properties>
    </style:style>
    <style:style style:name="T10" style:family="text">
      <style:text-properties style:text-position="33% 100%"/>
    </style:style>
    <style:style style:name="T11" style:family="text">
      <style:text-properties style:text-position="super 58%"/>
    </style:style>
    <style:style style:name="T12" style:family="text">
      <style:text-properties officeooo:rsid="0008fe9c"/>
    </style:style>
    <style:style style:name="T13" style:family="text">
      <style:text-properties fo:font-size="12pt" style:font-size-asian="12pt" style:font-size-complex="12pt"/>
    </style:style>
    <style:style style:name="T14" style:family="text">
      <style:text-properties style:text-position="0% 100%"/>
    </style:style>
    <style:style style:name="T15" style:family="text">
      <style:text-properties officeooo:rsid="00371a47"/>
    </style:style>
    <style:style style:name="T16" style:family="text">
      <style:text-properties fo:color="#7f7f7f" loext:opacity="100%"/>
    </style:style>
    <style:style style:name="T17" style:family="text">
      <style:text-properties officeooo:rsid="001143da"/>
    </style:style>
    <style:style style:name="T18" style:family="text">
      <style:text-properties officeooo:rsid="003ba285"/>
    </style:style>
    <style:style style:name="T19" style:family="text">
      <style:text-properties officeooo:rsid="0039e62a"/>
    </style:style>
    <style:style style:name="T20" style:family="text">
      <style:text-properties style:font-name="LibertinusSerif" fo:font-weight="normal" style:font-weight-asian="normal" style:font-family-complex="'Libertinus Serif'" style:font-family-generic-complex="system" style:font-pitch-complex="variable" style:font-weight-complex="normal"/>
    </style:style>
    <style:style style:name="T21" style:family="text">
      <style:text-properties style:font-name="LibertinusSerif" fo:font-weight="normal" officeooo:rsid="0026dd52" style:font-weight-asian="normal" style:font-family-complex="'Libertinus Serif'" style:font-family-generic-complex="system" style:font-pitch-complex="variable" style:font-weight-complex="normal"/>
    </style:style>
    <style:style style:name="T22" style:family="text">
      <style:text-properties style:font-name="LibertinusSerif" fo:font-weight="normal" officeooo:rsid="001143da" style:font-weight-asian="normal" style:font-family-complex="'Libertinus Serif'" style:font-family-generic-complex="system" style:font-pitch-complex="variable" style:font-weight-complex="normal"/>
    </style:style>
    <style:style style:name="T23" style:family="text">
      <style:text-properties officeooo:rsid="002d293b"/>
    </style:style>
    <style:style style:name="T24" style:family="text">
      <style:text-properties style:font-name="LibertinusSerif" style:font-family-complex="LibertinusSerif" style:font-family-generic-complex="system" style:font-pitch-complex="variable"/>
    </style:style>
    <style:style style:name="T25" style:family="text">
      <style:text-properties style:font-name="LibertinusSerif" style:font-family-complex="'Libertinus Serif'" style:font-family-generic-complex="system" style:font-pitch-complex="variable"/>
    </style:style>
    <style:style style:name="T26" style:family="text">
      <style:text-properties style:font-name="LibertinusSerif" fo:font-weight="bold" style:font-weight-asian="bold" style:font-family-complex="'Libertinus Serif'" style:font-family-generic-complex="system" style:font-pitch-complex="variable" style:font-weight-complex="bold"/>
    </style:style>
    <style:style style:name="T27" style:family="text">
      <style:text-properties style:font-name="LibertinusSerif" fo:language="sv" fo:country="SE" fo:font-weight="bold" style:font-weight-asian="bold" style:font-family-complex="'Libertinus Serif'" style:font-family-generic-complex="system" style:font-pitch-complex="variable" style:font-weight-complex="bold"/>
    </style:style>
    <style:style style:name="T28" style:family="text">
      <style:text-properties officeooo:rsid="000b6a58"/>
    </style:style>
    <style:style style:name="T29" style:family="text">
      <style:text-properties style:font-name="Libertinus Serif" style:font-family-complex="LibertinusSerif" style:font-family-generic-complex="system" style:font-pitch-complex="variable"/>
    </style:style>
    <style:style style:name="T30" style:family="text">
      <style:text-properties style:font-name="Cambria Math" style:font-name-complex="Cambria Math1"/>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officeooo:rsid="000cb7ed"/>
    </style:style>
    <style:style style:name="T34" style:family="text">
      <style:text-properties officeooo:rsid="000cd0e5"/>
    </style:style>
    <style:style style:name="T35" style:family="text">
      <style:text-properties fo:font-variant="normal" fo:text-transform="none" fo:color="#000000" loext:opacity="100%" style:text-line-through-style="none" style:text-line-through-type="none" fo:font-family="'Times New Roman', serif"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9"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NAME at PAN 202<text:span text:style-name="T1">6</text:span>: Your <text:span text:style-name="T2">T</text:span>itle <text:span text:style-name="T2">H</text:span>ere</text:p>
      <text:p text:style-name="P2">Notebook for the <text:span text:style-name="T3">PAN</text:span> Lab at CLEF 202<text:span text:style-name="T1">6</text:span></text:p>
      <text:p text:style-name="P3"><text:span text:style-name="T4">First</text:span> <text:span text:style-name="Author_20_Last_20_Name_20_Char">Ometov</text:span><text:span text:style-name="T5">1,</text:span><text:span text:style-name="T6">†</text:span><text:span text:style-name="T7">,</text:span> Tiago Prince <text:span text:style-name="Author_20_Last_20_Name_20_Char">Sales</text:span><text:span text:style-name="T8">2</text:span><text:span text:style-name="T9">,∗,†</text:span><text:span text:style-name="T10"> </text:span><text:span text:style-name="Author_20_Last_20_Name_20_Char">and </text:span>Manfred <text:span text:style-name="Author_20_Last_20_Name_20_Char">Jeusfeld</text:span><text:span text:style-name="T8">3,</text:span><text:span text:style-name="T9">†</text:span></text:p>
      <text:p text:style-name="University"><text:span text:style-name="T11">1</text:span> Tampere University of Applied Sciences, Kalevantie 4 33100 Tampere, Finland </text:p>
      <text:p text:style-name="University"><text:span text:style-name="T11">2</text:span> University of Twente, Drienerlolaan 5, 7522 NB, Enschede, The Netherlands </text:p>
      <text:p text:style-name="University"><text:span text:style-name="T11">3</text:span> University of Skövde, Högskolevägen 1, 541 28 Skövde, Sweden </text:p>
      <text:p text:style-name="University"/>
      <text:p text:style-name="Abstract_20_Title">Abstract</text:p>
      <text:p text:style-name="Abstract_20_Text">A clear and well-documented <text:span text:style-name="T12">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 loext:marker-style-name="T13">Keywords </text:p>
      <text:p text:style-name="Keywords_20_words" loext:marker-style-name="T13">paper template, paper formatting, CEUR-WS<text:span text:style-name="Footnote_20_Symbol"><text:span text:style-name="T14"> </text:span></text:span><text:span text:style-name="Footnote_20_Symbol"><text:span text:style-name="T14"><text:note text:id="ftn0" text:note-class="footnote"><text:note-citation>1</text:note-citation><text:note-body><text:p text:style-name="P4"><text:span text:style-name="T15"><text:s/>C</text:span>LEF 2026 Working Notes, 21 – 24 September 2026, Jena, Germany</text:p><text:p text:style-name="Footnote">∗ Corresponding author.</text:p><text:p text:style-name="Footnote"><text:span text:style-name="T11">† </text:span>These authors contributed equally.</text:p><text:p text:style-name="Footnote"><draw:frame text:anchor-type="as-char" draw:z-index="0" draw:name="Form1" draw:style-name="gr1" draw:text-style-name="P5" svg:width="0.309cm" svg:height="0.309cm"><draw:image xlink:href="Pictures/10000001000000FC000000F80911DDBA.png" xlink:type="simple" xlink:show="embed" xlink:actuate="onLoad" draw:mime-type="image/png"><text:p/></draw:image></draw:frame><text:s/><text:span text:style-name="Internet_20_link">aleksandr.ometov@tuni.fi</text:span><text:span text:style-name="T16">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1"><draw:image xlink:href="Pictures/100000010000080000000800F3D2ABE1.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17">0000-0000-0000-0000</text:span></text:span></text:a> (A. Ometov); <text:a xlink:type="simple" xlink:href="https://orcid.org/0000-0000-0000-0000" text:style-name="Internet_20_link" text:visited-style-name="Visited_20_Internet_20_Link"><text:span text:style-name="Internet_20_link"><text:span text:style-name="T17">0000-0000-0000-0000</text:span></text:span></text:a> (T. P. Sales); <text:a xlink:type="simple" xlink:href="https://orcid.org/0000-0000-0000-0000" text:style-name="Internet_20_link" text:visited-style-name="Visited_20_Internet_20_Link"><text:span text:style-name="Internet_20_link"><text:span text:style-name="T17">0000-0000-0000-0000</text:span></text:span></text:a> (M. Jeusfeld)</text:p><text:p text:style-name="P6"><draw:frame draw:style-name="fr2" draw:name="Rahmen1" text:anchor-type="as-char" svg:width="14.944cm" draw:z-index="2" loext:may-break-between-pages="true"><draw:text-box fo:min-height="0.041cm"><table:table table:name="Tabelle2" table:style-name="Tabelle2"><table:table-column table:style-name="Tabelle2.A"/><table:table-column table:style-name="Tabelle2.B"/><table:table-row table:style-name="Tabelle2.1"><table:table-cell table:style-name="Tabelle2.A1" office:value-type="string"><text:p text:style-name="P7"><draw:frame draw:style-name="fr1" draw:name="Bild2" text:anchor-type="as-char" svg:width="1.295cm" svg:height="0.457cm" draw:z-index="3"><draw:image xlink:href="Pictures/1000FDD800000C020000042B2282F5F3.emf" xlink:type="simple" xlink:show="embed" xlink:actuate="onLoad" draw:mime-type="image/x-emf"/><draw:image xlink:href="Pictures/10000001000000E800000051660C137F.png" xlink:type="simple" xlink:show="embed" xlink:actuate="onLoad" draw:mime-type="image/png"/></draw:frame></text:p></table:table-cell><table:table-cell table:style-name="Tabelle2.B1" office:value-type="string"><text:p text:style-name="P8">© 202<text:span text:style-name="T18">6</text:span> Copyright for this paper by its authors. Use permitted under Creative Commons License Attribution 4.0 International (CC BY 4.0). </text:p></table:table-cell></table:table-row></table:table></draw:text-box></draw:frame></text:p><text:p text:style-name="Footnote"/></text:note-body></text:note></text:span></text:span></text:p>
      <text:h text:style-name="Heading_20_1" text:outline-level="1">Introduction</text:h>
      <text:p text:style-name="P9">CEUR-WS’s <text:span text:style-name="T12">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10" text:outline-level="1">Mandatory Citations</text:h>
      <text:list xml:id="list2932069097" text:style-name="WWNum4">
        <text:list-item>
          <text:p text:style-name="Bulleted_20_List">To cite the PAN lab 202<text:span text:style-name="T19">6</text:span>, please use <text:bookmark-ref text:reference-format="number" text:ref-name="__RefNumPara__678_3665909460">[1]</text:bookmark-ref></text:p>
        </text:list-item>
        <text:list-item>
          <text:p text:style-name="Bulleted_20_List">To cite TIRA, please use <text:bookmark-ref text:reference-format="number" text:ref-name="__RefNumPara__1520_87603075">[2]</text:bookmark-ref></text:p>
        </text:list-item>
        <text:list-item>
          <text:p text:style-name="Bulleted_20_List">Organizers will further provide you with a BibTeX entry for the extended task overview paper.</text:p>
        </text:list-item>
      </text:list>
      <text:p text:style-name="P11">More and updated citations will be sent to authors before submission of the final version. Please make sure to update them accordingly.</text:p>
      <text:h text:style-name="P12" text:outline-level="1">Use of This Template</text:h>
      <text:p text:style-name="P13"><text:span text:style-name="T20">The </text:span><text:span text:style-name="T21">most up-to-date version of the </text:span><text:span text:style-name="T20">ceur-art template for </text:span><text:span text:style-name="T22">LibreOffice</text:span><text:span text:style-name="T20"> can be downloaded at:</text:span></text:p>
      <text:list xml:id="list152451888997400" text:continue-numbering="true" text:style-name="WWNum4">
        <text:list-item>
          <text:p text:style-name="Bulleted_20_List"><text:a xlink:type="simple" xlink:href="https://ceur-ws.org/Vol-XXX/" text:style-name="Internet_20_link" text:visited-style-name="Visited_20_Internet_20_Link"><text:span text:style-name="Internet_20_link"><text:span text:style-name="T23">CEUR-WS.org</text:span></text:span></text:a></text:p>
        </text:list-item>
      </text:list>
      <text:p text:style-name="Standard"><text:span text:style-name="T24">Modifying the template — including but not limited to: adjusting margins, typeface sizes, line spacing, paragraph and list definitions — is not allowed. </text:span><text:bookmark-start text:name="_Hlk168929474"/><text:span text:style-name="T25">Workshop organizers may want to provide </text:span><text:soft-page-break/><text:span text:style-name="T25">a copy of this template to authors where the event title in the footnote is updated to</text:span><text:bookmark-end text:name="_Hlk168929474"/><text:span text:style-name="T25"> </text:span><text:bookmark-start text:name="_Hlk168929516"/><text:bookmark-start text:name="_GoBack"/><text:span text:style-name="T25">their workshop details, see “Woodstock …” footnote on page 1. While we provide a Word/LibreOffice template, </text:span><text:span text:style-name="T26">we strongly recommend authors to use our LaTeX template</text:span><text:bookmark-end text:name="_Hlk168929516"/><text:bookmark-end text:name="_GoBack"/><text:span text:style-name="T25">.</text:span></text:p>
      <text:p text:style-name="P14"><text:span text:style-name="T25"/></text:p>
      <text:p text:style-name="P15"><text:span text:style-name="T27"/></text:p>
      <text:h text:style-name="P16" text:outline-level="1">Installing the Libertinus fonts</text:h>
      <text:p text:style-name="P9">CEURART uses the Libertinus fonts. You may have to install these fonts on your computer. The text below shows how to locally install them.</text:p>
      <text:h text:style-name="P17" text:outline-level="2">Libertinus fonts for Linux</text:h>
      <text:list xml:id="list795903965" text:style-name="WWNum3">
        <text:list-item>
          <text:p text:style-name="P18">Download the latest Libertinus zip file from the repository at https://github.com/alerque/libertinus/releases.</text:p>
        </text:list-item>
        <text:list-item>
          <text:p text:style-name="P19">Extract the files to a temporary directory, e.g. ~/Downloads/Libertinus-7</text:p>
        </text:list-item>
        <text:list-item>
          <text:p text:style-name="P19">Make sure that a directory ~/.local/share/fonts exists.</text:p>
        </text:list-item>
        <text:list-item>
          <text:p text:style-name="P19">Copy the Libertinus fonts: cp ~/Downloads/Libertinus-7/static/OTF/*.otf ~/.local/share/fonts</text:p>
        </text:list-item>
        <text:list-item>
          <text:p text:style-name="P19">The fonts should now be installed.</text:p>
        </text:list-item>
      </text:list>
      <text:h text:style-name="P17" text:outline-level="2">Libertinus fonts for Windows</text:h>
      <text:list xml:id="list152451945900428" text:continue-list="list795903965" text:style-name="WWNum41">
        <text:list-item text:start-value="1">
          <text:p text:style-name="P20">Download the latest Libertinus zip file <text:span text:style-name="Internet_20_link">from the repository at https://github.com/alerque/libertinus/releases.</text:span></text:p>
        </text:list-item>
        <text:list-item text:style-override="WWNum3">
          <text:p text:style-name="P21">Extract the files to a temporary directory, e.g. C:\users\&lt;username&gt;\Downloads\Libertinus-7</text:p>
        </text:list-item>
        <text:list-item text:style-override="WWNum3">
          <text:p text:style-name="P19">Open the Windows 10 “Settings” from the Start menu and switch to the Personalization / Fonts it should display the currently installed fonts, each as a directory.</text:p>
        </text:list-item>
        <text:list-item text:style-override="WWNum3">
          <text:p text:style-name="P19">Navigate to the directory<text:line-break/>C:\users\&lt;username&gt;\Downloads\Libertinus-7\Downloads\Libertinus-7\static\OTF </text:p>
        </text:list-item>
        <text:list-item text:style-override="WWNum3">
          <text:p text:style-name="P19">Select all files with extension .otf and drag and drop them to the field “Drag and drop to install” of the selected settings menu.</text:p>
        </text:list-item>
        <text:list-item text:style-override="WWNum3">
          <text:p text:style-name="P19">Close the windows; the fonts should now be installed.</text:p>
        </text:list-item>
      </text:list>
      <text:p text:style-name="P22">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22"><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7" text:outline-level="2">Libertinus fonts for macOS</text:h>
      <text:list xml:id="list152451293995238" text:continue-list="list152451945900428" text:style-name="WWNum42">
        <text:list-item text:start-value="1">
          <text:p text:style-name="P23">Download the latest Libertinus zip file <text:span text:style-name="T28">from</text:span> <text:span text:style-name="Internet_20_link">https://github.com/alerque/libertinus/releases</text:span>.</text:p>
        </text:list-item>
        <text:list-item text:style-override="WWNum3">
          <text:p text:style-name="P24">Extract the files to a temporary directory, e.g. ~/Downloads/Libertinus-7</text:p>
        </text:list-item>
        <text:list-item text:style-override="WWNum3">
          <text:p text:style-name="P24">Open the Font Book app.</text:p>
        </text:list-item>
        <text:list-item text:style-override="WWNum3">
          <text:p text:style-name="P24">Navigate to the directory e.g. ~/Downloads/Libertinus-7/static/OTF</text:p>
        </text:list-item>
        <text:list-item text:style-override="WWNum3">
          <text:p text:style-name="P24">Drag and drop all .otf files to the Font Book window.</text:p>
        </text:list-item>
        <text:list-item text:style-override="WWNum3">
          <text:p text:style-name="P24">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16" text:outline-level="1"><text:soft-page-break/>Front matter</text:h>
      <text:h text:style-name="P25" text:outline-level="2">Title information</text:h>
      <text:p text:style-name="P9">For each proceedings volume published with CEUR-WS, the titles of its papers should either all use the emphasizing capitalized style or the regular English (or native language) style. Check with the editors of your volume which style you should adopt.</text:p>
      <text:p text:style-name="P9" loext:marker-style-name="T24"><text:s/><text:span text:style-name="T24"/></text:p>
      <text:p text:style-name="Standard" loext:marker-style-name="T24"><text:span text:style-name="T29">Do not insert line breaks in your title.</text:span><text:span text:style-name="T24"> </text:span></text:p>
      <text:h text:style-name="P17" text:outline-level="2">Authors and affiliations</text:h>
      <text:p text:style-name="P9">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continue-list="list152451888997400" text:style-name="WWNum4">
        <text:list-item>
          <text:p text:style-name="P26">affiliation mark: a superscript number following the author’s last name.</text:p>
        </text:list-item>
      </text:list>
      <text:p text:style-name="Standard">The author names and affiliations could be formatted in two ways:</text:p>
      <text:list xml:id="list152451740300746" text:continue-numbering="true" text:style-name="WWNum4">
        <text:list-item>
          <text:p text:style-name="P26">Group the authors per affiliation.</text:p>
        </text:list-item>
        <text:list-item>
          <text:p text:style-name="P26">Use an explicit mark to indicate the affiliations.</text:p>
        </text:list-item>
      </text:list>
      <text:h text:style-name="P17" text:outline-level="2">Keywords</text:h>
      <text:p text:style-name="Standard">Keywords should be separated by commas.</text:p>
      <text:h text:style-name="P17" text:outline-level="2">Various marks in the front matter</text:h>
      <text:p text:style-name="P9">The front matter becomes complicated due to various kinds of notes and marks to the title and author names. footnotes are denoted by super scripted Arabic numerals, corresponding author by a Conformal asterisk (*) mark.</text:p>
      <text:h text:style-name="P27" text:outline-level="3">Title marks</text:h>
      <text:p text:style-name="P9">Marks in the title should be denoted by a star (<text:span text:style-name="T30">⋆</text:span>) mark.</text:p>
      <text:h text:style-name="P28" text:outline-level="3">Author marks</text:h>
      <text:p text:style-name="P9">Author names can have some kinds of marks and notes:</text:p>
      <text:list xml:id="list152451415979745" text:continue-numbering="true" text:style-name="WWNum4">
        <text:list-item>
          <text:p text:style-name="P26">corresponding author mark: a superscript asterisk (<text:span text:style-name="T9">∗</text:span>) after the affiliation mark(s)</text:p>
        </text:list-item>
        <text:list-item>
          <text:p text:style-name="P26">equal contribution mark: a superscript dagger (<text:span text:style-name="T11">†</text:span>) after the corresponding author mark or the affiliation mark.</text:p>
        </text:list-item>
      </text:list>
      <text:h text:style-name="P27" text:outline-level="3">Other marks</text:h>
      <text:p text:style-name="Standard">At times, authors want footnotes which leave no marks in the author names. The note text shall be listed as part of the front matter notes.</text:p>
      <text:h text:style-name="P16" text:outline-level="1">Sections</text:h>
      <text:p text:style-name="P9">You should use the pre-defined styles for sections (Heading 1), subsections (Heading 2), and subsubsections (Heading 3). </text:p>
      <text:p text:style-name="Standard"><text:soft-page-break/>There should be no empty lines before section headings. The template already adds the necessary spacing before them.</text:p>
      <text:h text:style-name="P16" text:outline-level="1">Paragraphs</text:h>
      <text:p text:style-name="P9">Paragraphs should be indented except for the first paragraph after a section, subsection, or subsubsection, which should not. </text:p>
      <text:p text:style-name="Standard">The default style for paragraphs is called <text:span text:style-name="T31">Normal</text:span>. First paragraphs should be styled with <text:span text:style-name="T31">Normal (non-indented)</text:span>. </text:p>
      <text:h text:style-name="P16" text:outline-level="1">Lists</text:h>
      <text:p text:style-name="P9">Here is an example of a numbered list:</text:p>
      <text:list text:continue-list="list152451293995238" text:style-name="WWNum3">
        <text:list-item>
          <text:p text:style-name="P24">Item 1</text:p>
        </text:list-item>
        <text:list-item>
          <text:p text:style-name="P24">Item 2</text:p>
        </text:list-item>
        <text:list-item>
          <text:p text:style-name="P24">Item 3</text:p>
        </text:list-item>
      </text:list>
      <text:p text:style-name="Standard">Here is an example of a bulleted list:</text:p>
      <text:list text:continue-list="list152451415979745" text:style-name="WWNum4">
        <text:list-item>
          <text:p text:style-name="P26">Item 1</text:p>
        </text:list-item>
        <text:list-item>
          <text:p text:style-name="P26">Item 2</text:p>
        </text:list-item>
        <text:list-item>
          <text:p text:style-name="P26">Item 3</text:p>
        </text:list-item>
      </text:list>
      <text:h text:style-name="P16" text:outline-level="1">Tables</text:h>
      <text:p text:style-name="P9">In this section, you can find an example of table styling. Note that captions are placed <text:span text:style-name="T32">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9">Non-English or Math</text:p>
          </table:table-cell>
          <table:table-cell table:style-name="Tabelle3.A1" office:value-type="string">
            <text:p text:style-name="P29">Frequency</text:p>
          </table:table-cell>
          <table:table-cell table:style-name="Tabelle3.A1" office:value-type="string">
            <text:p text:style-name="P30">Comments</text:p>
          </table:table-cell>
        </table:table-row>
        <table:table-row table:style-name="Tabelle3.1">
          <table:table-cell table:style-name="Tabelle3.A2" office:value-type="string">
            <text:p text:style-name="P29">Ø</text:p>
          </table:table-cell>
          <table:table-cell table:style-name="Tabelle3.A2" office:value-type="string">
            <text:p text:style-name="P29">1 in 1,000</text:p>
          </table:table-cell>
          <table:table-cell table:style-name="Tabelle3.A2" office:value-type="string">
            <text:p text:style-name="P30">For Swedish names</text:p>
          </table:table-cell>
        </table:table-row>
        <table:table-row table:style-name="Tabelle3.1">
          <table:table-cell table:style-name="Tabelle3.A3" office:value-type="string">
            <text:p text:style-name="P31">𝜋</text:p>
          </table:table-cell>
          <table:table-cell table:style-name="Tabelle3.A3" office:value-type="string">
            <text:p text:style-name="P29">1 in 5</text:p>
          </table:table-cell>
          <table:table-cell table:style-name="Tabelle3.A3" office:value-type="string">
            <text:p text:style-name="P30">Common in math</text:p>
          </table:table-cell>
        </table:table-row>
        <table:table-row table:style-name="Tabelle3.1">
          <table:table-cell table:style-name="Tabelle3.A3" office:value-type="string">
            <text:p text:style-name="P29">$</text:p>
          </table:table-cell>
          <table:table-cell table:style-name="Tabelle3.A3" office:value-type="string">
            <text:p text:style-name="P29">4 in 5</text:p>
          </table:table-cell>
          <table:table-cell table:style-name="Tabelle3.A3" office:value-type="string">
            <text:p text:style-name="P30">Used in business</text:p>
          </table:table-cell>
        </table:table-row>
        <table:table-row table:style-name="Tabelle3.1">
          <table:table-cell table:style-name="Tabelle3.A5" office:value-type="string">
            <text:p text:style-name="P29">Ψ</text:p>
          </table:table-cell>
          <table:table-cell table:style-name="Tabelle3.A5" office:value-type="string">
            <text:p text:style-name="P29">1 in 40,000</text:p>
          </table:table-cell>
          <table:table-cell table:style-name="Tabelle3.A5" office:value-type="string">
            <text:p text:style-name="P30">Unexplained usage</text:p>
          </table:table-cell>
        </table:table-row>
      </table:table>
      <text:h text:style-name="P16" text:outline-level="1">Equations</text:h>
      <text:p text:style-name="P9">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32"><draw:frame draw:style-name="fr3" draw:name="Objekt1" text:anchor-type="as-char" svg:width="1.506cm" svg:height="0.529cm" draw:z-index="4"><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33">(1)</text:p>
          </table:table-cell>
        </table:table-row>
      </table:table>
      <text:p text:style-name="Standard">where ...</text:p>
      <text:h text:style-name="P16" text:outline-level="1"><text:soft-page-break/>Appendices</text:h>
      <text:p text:style-name="P9">Appendices should be added after the references. Note that in the appendix, sections are lettered, not numbered.</text:p>
      <text:h text:style-name="P34" text:outline-level="1">Acknowledgements</text:h>
      <text:p text:style-name="P9">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33">m</text:span>pere University of Applied Sciences, FI). The template is made available under a Creative Commons License Attribution-ShareAlike 4.0 International (CC BY-SA 4.0).</text:p>
      <text:h text:style-name="P35" text:outline-level="1">Declaration on Generative AI</text:h>
      <text:p text:style-name="P36">Either:</text:p>
      <text:p text:style-name="P37"><text:span text:style-name="T34">The author(s)</text:span><text:bookmark text:name="docs-internal-guid-58575a14-7fff-806e-686a-1acba85d7f70"/><text:span text:style-name="T34"> </text:span><text:span text:style-name="T33">have n</text:span><text:span text:style-name="T35">ot employed any Generative AI tools.</text:span></text:p>
      <text:p text:style-name="P37"><text:span text:style-name="T35"/></text:p>
      <text:p text:style-name="P38">Or (by using the activity taxonomy in ceur-ws.org/genai-tax.html):</text:p>
      <text:p text:style-name="P39"><text:span text:style-name="T36">During the preparation of this work, the author(s) used X-GPT-4 and Gramby in order to: </text:span><text:span text:style-name="T37">Grammar and spelling check</text:span><text:span text:style-name="T36">. Further, the author(s) used X-AI-IMG for figures 3 and 4 in order to: </text:span><text:span text:style-name="T37">Generate images</text:span><text:span text:style-name="T36">. After using these tool(s)/service(s), the author(s) reviewed and edited the content as needed and take(s) full responsibility for the publication’s content.</text:span><text:span text:style-name="T38"> </text:span></text:p>
      <text:h text:style-name="P40" text:outline-level="1">References</text:h>
      <text:list text:style-name="WWNum24">
        <text:list-item>
          <text:p text:style-name="P41"><text:bookmark-start text:name="__RefNumPara__678_3665909460"/>J. Bevendorff, M. Fröbe, A. Greiner-Petter, A. Jakoby, M. Mayerl, P. Nakov, H. Plutz, M. Potthast, B. Stein, M. N. Ta, Y. Wang, E. Zangerle, in: M. Hagen, M. Potthast, B. Stein, P. Schaer, E. Zangerle, A. Barrón-Cedeño, A. G. S. de Herrera, E. S. Salido, S. MacAvaney, J. M. Struß (Eds.), Experimental IR Meets Multilinguality, Multimodality, and Interaction. Proceedings of the Seventeenth International Conference of the CLEF Association (CLEF 2026), Lecture Notes in Computer Science, Springer, Berlin Heidelberg New York, 2026.<text:bookmark-end text:name="__RefNumPara__678_3665909460"/></text:p>
        </text:list-item>
        <text:list-item>
          <text:p text:style-name="P42"><text:bookmark-start text:name="__RefNumPara__1520_87603075"/><text:span text:style-name="T39">M. Fröbe, M. Wiegmann, N. Kolyada, B. Grahm, T. Elstner, F. Loebe, M. Hagen, B. Stein, M. Potthast, Continuous Integration for Reproducible Shared Tasks with TIRA.io, in: J. Kamps, L. Goeuriot, F. Crestani, M. Maistro, H. Joho, B. Davis, C. Gurrin, U. Kruschwitz, A. Caputo (Eds.), Advances in Information Retrieval. 45th European Conference on IR Research (ECIR 2023), Lecture Notes in Computer Science, Springer, Berlin Heidelberg New York, 2023, pp. 236–241. URL: </text:span><text:a xlink:type="simple" xlink:href="https://link.springer.com/chapter/10.1007/978-3-031-28241-6_20" text:style-name="Internet_20_link" text:visited-style-name="Visited_20_Internet_20_Link"><text:span text:style-name="T39">https://link.springer.com/chapter/10.1007/978-3-031-28241-6_20</text:span></text:a><text:span text:style-name="T39">. doi:</text:span><text:a xlink:type="simple" xlink:href="http://dx.doi.org/10.1007/978-3-031-28241-6_20" text:style-name="Internet_20_link" text:visited-style-name="Visited_20_Internet_20_Link"><text:span text:style-name="T39">10.1007/978-3-031-28241-6_20</text:span></text:a><text:span text:style-name="T39">.</text:span><text:bookmark-end text:name="__RefNumPara__1520_8760307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adornments="Bold"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423cm" fo:margin-bottom="0.318cm" style:contextual-spacing="false" fo:text-align="left" style:justify-single-word="false" fo:keep-with-next="always"/>
      <style:text-properties style:font-name="Libertinus Sans1" fo:font-family="'Libertinus Sans'" style:font-style-name="Bold"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chapter">
      <style:paragraph-properties fo:margin-left="1.401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chapter">
      <style:paragraph-properties fo:margin-left="2.161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chapter">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lef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top="0.494cm" fo:margin-bottom="0.494cm" style:contextual-spacing="true" fo:text-align="lef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top="0.529cm" fo:margin-bottom="0cm" style:contextual-spacing="false" fo:text-align="lef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lef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lef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212cm" fo:margin-bottom="0.423cm" style:contextual-spacing="true" fo:text-align="lef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lef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lef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5</meta:editing-cycles>
    <meta:print-date>2021-03-21T00:36:00</meta:print-date>
    <meta:creation-date>2024-01-16T11:58:00</meta:creation-date>
    <dc:date>2026-06-17T15:24:29.426150138</dc:date>
    <meta:editing-duration>PT1H38M26S</meta:editing-duration>
    <meta:generator>LibreOffice/26.2.3.2$Linux_X86_64 LibreOffice_project/620$Build-2</meta:generator>
    <meta:document-statistic meta:table-count="3" meta:image-count="2" meta:object-count="1" meta:page-count="5" meta:paragraph-count="133" meta:word-count="1499" meta:character-count="9829" meta:non-whitespace-character-count="849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